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39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1.8016in"/>
    </style:style>
    <style:style style:name="co4" style:family="table-column">
      <style:table-column-properties fo:break-before="auto" style:column-width="4.5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963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Text">
      <style:table-cell-properties fo:wrap-option="wrap"/>
    </style:style>
    <style:style style:name="ce6" style:family="table-cell" style:parent-style-name="Text"/>
    <style:style style:name="ce8" style:family="table-cell" style:parent-style-name="Text"/>
    <style:style style:name="ce9" style:family="table-cell" style:parent-style-name="Default"/>
    <style:style style:name="ce10" style:family="table-cell" style:parent-style-name="Default"/>
    <style:style style:name="ce3" style:family="table-cell" style:parent-style-name="Default">
      <style:table-cell-properties fo:wrap-option="wrap"/>
    </style:style>
    <style:style style:name="ce4" style:family="table-cell" style:parent-style-name="Note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3"/>
        <table:table-column table:style-name="co5" table:number-columns-repeated="16380" table:default-cell-style-name="Default"/>
        <table:table-row table:style-name="ro1">
          <table:table-cell table:style-name="Text" table:formula="of:=COUNTA([.B4:.B1048576])" office:value-type="float" office:value="74" calcext:value-type="float">
            <text:p>74</text:p>
          </table:table-cell>
          <table:table-cell table:style-name="ce5" table:formula="of:=COUNTIF([.B4:.B1048576];&quot;Yes&quot;) / COUNTA([.B4:.B1048576])" office:value-type="float" office:value="0.148648648648649" calcext:value-type="float">
            <text:p>0.148648648648649</text:p>
          </table:table-cell>
          <table:table-cell table:style-name="ce3"/>
          <table:table-cell table:style-name="ce4" office:value-type="string" calcext:value-type="string">
            <text:p>Games are tested in fullscreen during active game play, in multiplayer sessions (if-applicable)</text:p>
          </table:table-cell>
          <table:table-cell table:style-name="ce3" table:number-columns-repeated="16380"/>
        </table:table-row>
        <table:table-row table:style-name="ro1">
          <table:table-cell table:style-name="Text"/>
          <table:table-cell table:style-name="ce5" table:formula="of:=COUNTIF([.B4:.B1048576];&quot;Yes&quot;)" office:value-type="float" office:value="11" calcext:value-type="float">
            <text:p>11</text:p>
          </table:table-cell>
          <table:table-cell table:style-name="ce3"/>
          <table:table-cell table:style-name="ce4"/>
          <table:table-cell table:style-name="ce3" table:number-columns-repeated="16380"/>
        </table:table-row>
        <table:table-row table:style-name="ro2">
          <table:table-cell office:value-type="string" calcext:value-type="string">
            <text:p>Game</text:p>
          </table:table-cell>
          <table:table-cell office:value-type="string" calcext:value-type="string">
            <text:p>Inhibits sleep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Notes: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7 Days To Di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SYSTEM: [PROCESS] \Device\HarddiskVolume3\Program Files (x86)\Steam\steamapps\common\7 Days To Die\7DaysToDie.exe, AWAYMODE: [PROCESS] \Device\HarddiskVolume3\Program Files (x86)\Steam\steamapps\common\7 Days To Die\7DaysToDie.exe meaning the screen can turn off, but the system cannot suspend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 Game About Digging A Ho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erture Desk Job</text:p>
          </table:table-cell>
          <table:table-cell table:style-name="ce8" office:value-type="string" calcext:value-type="string">
            <text:p>Yes</text:p>
          </table:table-cell>
          <table:table-cell office:value-type="string" calcext:value-type="string">
            <text:p>Source 2</text:p>
          </table:table-cell>
          <table:table-cell office:value-type="string" calcext:value-type="string">
            <text:p>Displa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etto Corsa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Proprietary</text:p>
          </table:table-cell>
          <table:table-cell table:style-name="Default" office:value-type="string" calcext:value-type="string">
            <text:p>Displa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utomation – The Car Company Tycoon G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ttleBit Remaster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ttleBlock Thea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amNG.Dr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l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yond The Wi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rawlhal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glin’ Gnom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stle Crash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heese Roll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ustertruck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Content Warn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unter-Strike 2</text:p>
          </table:table-cell>
          <table:table-cell table:style-name="ce8" office:value-type="string" calcext:value-type="string">
            <text:p>Yes</text:p>
          </table:table-cell>
          <table:table-cell office:value-type="string" calcext:value-type="string">
            <text:p>Source 2</text:p>
          </table:table-cell>
          <table:table-cell office:value-type="string" calcext:value-type="string">
            <text:p>Displa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unter-Strike: Global Offensive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our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adlock</text:p>
          </table:table-cell>
          <table:table-cell table:style-name="ce8" office:value-type="string" calcext:value-type="string">
            <text:p>Yes</text:p>
          </table:table-cell>
          <table:table-cell office:value-type="string" calcext:value-type="string">
            <text:p>Source 2</text:p>
          </table:table-cell>
          <table:table-cell office:value-type="string" calcext:value-type="string">
            <text:p>Displa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ep Rock Galact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ite Dangerou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ERSPA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out: New Veg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mble With Your 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rry’s M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ur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olf It!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olf With Your 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alf-Life 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ur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alf-Life Alyx</text:p>
          </table:table-cell>
          <table:table-cell table:style-name="ce8" office:value-type="string" calcext:value-type="string">
            <text:p>Yes</text:p>
          </table:table-cell>
          <table:table-cell office:value-type="string" calcext:value-type="string">
            <text:p>Source 2</text:p>
          </table:table-cell>
          <table:table-cell office:value-type="string" calcext:value-type="string">
            <text:p>Displa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alo Infini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Displa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ell Let Loo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4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elldivers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<text:span text:style-name="T1">Keep awake reason is shown as: </text:span>SYSTEM: [PROCESS] \Device\HarddiskVolume3\Program Files (x86)\Steam\steamapps\common\Helldivers 2\bin\helldivers2.exe, meaning the screen can turn off, but the system cannot suspen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uman Fall F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: Sandst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ackbox Party Pack 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no: New Origi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ndfall Archives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Left 4 Dead 2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our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thal Company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 Riva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CCHA CHAMELE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necraf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dRunn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Display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Overwa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Keep awake reason is shown as: SYSTEM: [PROCESS] \Device\HarddiskVolume3\Program Files (x86)\Steam\steamapps\common\Overwatch\Overwatch.exe, meaning the screen can turn off, but the system cannot suspen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a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hasmophob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net Coaster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ly Brid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rtal 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ur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ject Zombo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sychonauts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PUBG: Battlegr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.E.P.O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eiver 2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Restaura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SK: Global Domin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ocket Leag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u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V There Yet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tisfac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ce Engine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itg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qu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 Engine 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amV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splay, vrwebhelper, vrcomposito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tormworks: Build and Resc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 Battle Gol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erraria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Trackman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ackMania Nations Forever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Proprietary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Ultimate Chicken Ho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turned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VRCh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War Thun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 (Dagor Engin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ap Yap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Unity</text:p>
          </table:table-cell>
          <table:table-cell table:number-columns-repeated="16381"/>
        </table:table-row>
        <table:table-row table:style-name="ro2" table:number-rows-repeated="4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2" table:number-rows-repeated="104849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B82:Sheet1.B1048576 Sheet1.B77:Sheet1.B77 Sheet1.B8:Sheet1.B75 Sheet1.B1:Sheet1.B3">
            <calcext:condition calcext:apply-style-name="Bad" calcext:value="contains-text(&quot;Yes&quot;)" calcext:base-cell-address="Sheet1.B1"/>
          </calcext:conditional-format>
          <calcext:conditional-format calcext:target-range-address="Sheet1.B76:Sheet1.B76">
            <calcext:condition calcext:apply-style-name="Bad" calcext:value="contains-text(&quot;Yes&quot;)" calcext:base-cell-address="Sheet1.B76"/>
          </calcext:conditional-format>
          <calcext:conditional-format calcext:target-range-address="Sheet1.B4:Sheet1.B7">
            <calcext:condition calcext:apply-style-name="Bad" calcext:value="contains-text(&quot;Yes&quot;)" calcext:base-cell-address="Sheet1.B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D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 style:data-style-name="N2" text:time-value="15:30:28.86850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5T20:35:30.437089000</meta:creation-date>
    <dc:date>2026-07-18T19:32:26.010414100</dc:date>
    <meta:editing-duration>PT1H58M19S</meta:editing-duration>
    <meta:editing-cycles>8</meta:editing-cycles>
    <meta:generator>LibreOffice/25.2.7.2$Windows_X86_64 LibreOffice_project/5cbfd1ab6520636bb5f7b99185aa69bd7456825d</meta:generator>
    <meta:document-statistic meta:table-count="1" meta:cell-count="241" meta:object-count="0"/>
  </office:meta>
</office:document-meta>
</file>